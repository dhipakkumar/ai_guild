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Notebook for task1</text:title></text:p>
      <text:p text:style-name="OrgTitle"/>
      <text:p text:style-name="OrgSubtitle"><text:initial-creator>crypticwrath77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6b03fb">1. Checkpoint 1:</text:a></text:p>
        </text:index-body>
      </text:table-of-content>
      <text:h text:style-name="Heading_20_1" text:outline-level="1" text:is-list-header="false">
<text:bookmark-start text:name="OrgXref.org26b03fb"/>
<text:bookmark text:name="org26b03fb"/>Checkpoint 1:
<text:bookmark-end text:name="OrgXref.org26b03fb"/></text:h>
      <text:list text:style-name="OrgBulletedList" text:continue-numbering="false">
        <text:list-item>
          <text:p text:style-name="Text_20_body">just importing stuff that might be required…</text:p>
        </text:list-item>
      </text:list>
      <text:p text:style-name="OrgSrcBlock"><text:span text:style-name="OrgSrcFontLockKeywordFace">from</text:span><text:s/>pathlib<text:s/><text:span text:style-name="OrgSrcFontLockKeywordFace">import</text:span><text:s/>Path</text:p>
      <text:p text:style-name="OrgSrcBlock"><text:span text:style-name="OrgSrcFontLockKeywordFace">import</text:span><text:s/>pandas<text:s/><text:span text:style-name="OrgSrcFontLockKeywordFace">as</text:span><text:s/>pd</text:p>
      <text:p text:style-name="OrgSrcBlock"><text:span text:style-name="OrgSrcFontLockKeywordFace">import</text:span><text:s/>matplotlib.pyplot<text:s/><text:span text:style-name="OrgSrcFontLockKeywordFace">as</text:span><text:s/>plt</text:p>
      <text:p text:style-name="OrgSrcBlockLastLine"><text:span text:style-name="OrgSrcFontLockVariableNameFace">DATA_DIR</text:span><text:s/><text:span text:style-name="OrgSrcFontLockOperatorFace">=</text:span><text:s/>Path(<text:span text:style-name="OrgSrcFontLockStringFace">"UCI_HAR_Dataset"</text:span>)</text:p>
      <text:p text:style-name="OrgSrcBlock"><text:span text:style-name="OrgSrcFontLockVariableNameFace">activity_labels</text:span><text:s/><text:span text:style-name="OrgSrcFontLockOperatorFace">=</text:span><text:s/>pd.read_csv(</text:p>
      <text:p text:style-name="OrgSrcBlock"><text:s/><text:s/><text:s/><text:s/>DATA_DIR<text:s/><text:span text:style-name="OrgSrcFontLockOperatorFace">/</text:span><text:s/><text:span text:style-name="OrgSrcFontLockStringFace">"activity_labels.txt"</text:span>,</text:p>
      <text:p text:style-name="OrgSrcBlock"><text:s/><text:s/><text:s/><text:s/>sep<text:span text:style-name="OrgSrcFontLockOperatorFace">=</text:span>r<text:span text:style-name="OrgSrcFontLockStringFace">"\s+"</text:span>,</text:p>
      <text:p text:style-name="OrgSrcBlock"><text:s/><text:s/><text:s/><text:s/>header<text:span text:style-name="OrgSrcFontLockOperatorFace">=</text:span><text:span text:style-name="OrgSrcFontLockConstantFace">None</text:span>,</text:p>
      <text:p text:style-name="OrgSrcBlock"><text:s/><text:s/><text:s/><text:s/>names<text:span text:style-name="OrgSrcFontLockOperatorFace">=</text:span>[<text:span text:style-name="OrgSrcFontLockStringFace">"id"</text:span>,<text:s/><text:span text:style-name="OrgSrcFontLockStringFace">"activity"</text:span>]</text:p>
      <text:p text:style-name="OrgSrcBlock">)</text:p>
      <text:p text:style-name="OrgSrcBlock"/>
      <text:p text:style-name="OrgSrcBlock"><text:span text:style-name="OrgSrcFontLockVariableNameFace">y_train</text:span><text:s/><text:span text:style-name="OrgSrcFontLockOperatorFace">=</text:span><text:s/>pd.read_csv(</text:p>
      <text:p text:style-name="OrgSrcBlock"><text:s/><text:s/><text:s/><text:s/>DATA_DIR<text:s/><text:span text:style-name="OrgSrcFontLockOperatorFace">/</text:span><text:s/><text:span text:style-name="OrgSrcFontLockStringFace">"train"</text:span><text:s/><text:span text:style-name="OrgSrcFontLockOperatorFace">/</text:span><text:s/><text:span text:style-name="OrgSrcFontLockStringFace">"y_train.txt"</text:span>,</text:p>
      <text:p text:style-name="OrgSrcBlock"><text:s/><text:s/><text:s/><text:s/>header<text:span text:style-name="OrgSrcFontLockOperatorFace">=</text:span><text:span text:style-name="OrgSrcFontLockConstantFace">None</text:span>,</text:p>
      <text:p text:style-name="OrgSrcBlock"><text:s/><text:s/><text:s/><text:s/>names<text:span text:style-name="OrgSrcFontLockOperatorFace">=</text:span>[<text:span text:style-name="OrgSrcFontLockStringFace">"activity_id"</text:span>]</text:p>
      <text:p text:style-name="OrgSrcBlock">)</text:p>
      <text:p text:style-name="OrgSrcBlock"/>
      <text:p text:style-name="OrgSrcBlock"><text:span text:style-name="OrgSrcFontLockVariableNameFace">acc_x</text:span><text:s/><text:span text:style-name="OrgSrcFontLockOperatorFace">=</text:span><text:s/>pd.read_csv(</text:p>
      <text:p text:style-name="OrgSrcBlock"><text:s/><text:s/><text:s/><text:s/>DATA_DIR<text:s/><text:span text:style-name="OrgSrcFontLockOperatorFace">/</text:span><text:s/><text:span text:style-name="OrgSrcFontLockStringFace">"train"</text:span><text:s/><text:span text:style-name="OrgSrcFontLockOperatorFace">/</text:span><text:s/><text:span text:style-name="OrgSrcFontLockStringFace">"Inertial<text:s/>Signals"</text:span><text:s/><text:span text:style-name="OrgSrcFontLockOperatorFace">/</text:span><text:s/><text:span text:style-name="OrgSrcFontLockStringFace">"total_acc_x_train.txt"</text:span>,</text:p>
      <text:p text:style-name="OrgSrcBlock"><text:s/><text:s/><text:s/><text:s/>sep<text:span text:style-name="OrgSrcFontLockOperatorFace">=</text:span>r<text:span text:style-name="OrgSrcFontLockStringFace">"\s+"</text:span>,</text:p>
      <text:p text:style-name="OrgSrcBlock"><text:s/><text:s/><text:s/><text:s/>header<text:span text:style-name="OrgSrcFontLockOperatorFace">=</text:span><text:span text:style-name="OrgSrcFontLockConstantFace">None</text:span></text:p>
      <text:p text:style-name="OrgSrcBlock">)</text:p>
      <text:p text:style-name="OrgSrcBlock"/>
      <text:p text:style-name="OrgSrcBlock"><text:span text:style-name="OrgSrcFontLockVariableNameFace">acc_y</text:span><text:s/><text:span text:style-name="OrgSrcFontLockOperatorFace">=</text:span><text:s/>pd.read_csv(</text:p>
      <text:p text:style-name="OrgSrcBlock"><text:s/><text:s/><text:s/><text:s/>DATA_DIR<text:s/><text:span text:style-name="OrgSrcFontLockOperatorFace">/</text:span><text:s/><text:span text:style-name="OrgSrcFontLockStringFace">"train"</text:span><text:s/><text:span text:style-name="OrgSrcFontLockOperatorFace">/</text:span><text:s/><text:span text:style-name="OrgSrcFontLockStringFace">"Inertial<text:s/>Signals"</text:span><text:s/><text:span text:style-name="OrgSrcFontLockOperatorFace">/</text:span><text:s/><text:span text:style-name="OrgSrcFontLockStringFace">"total_acc_y_train.txt"</text:span>,</text:p>
      <text:p text:style-name="OrgSrcBlock"><text:s/><text:s/><text:s/><text:s/>sep<text:span text:style-name="OrgSrcFontLockOperatorFace">=</text:span>r<text:span text:style-name="OrgSrcFontLockStringFace">"\s+"</text:span>,</text:p>
      <text:p text:style-name="OrgSrcBlock"><text:s/><text:s/><text:s/><text:s/>header<text:span text:style-name="OrgSrcFontLockOperatorFace">=</text:span><text:span text:style-name="OrgSrcFontLockConstantFace">None</text:span></text:p>
      <text:p text:style-name="OrgSrcBlock">)</text:p>
      <text:p text:style-name="OrgSrcBlock"><text:span text:style-name="OrgSrcFontLockVariableNameFace">acc_z</text:span><text:s/><text:span text:style-name="OrgSrcFontLockOperatorFace">=</text:span><text:s/>pd.read_csv(</text:p>
      <text:p text:style-name="OrgSrcBlock"><text:s/><text:s/><text:s/><text:s/>DATA_DIR<text:s/><text:span text:style-name="OrgSrcFontLockOperatorFace">/</text:span><text:s/><text:span text:style-name="OrgSrcFontLockStringFace">"train"</text:span><text:s/><text:span text:style-name="OrgSrcFontLockOperatorFace">/</text:span><text:s/><text:span text:style-name="OrgSrcFontLockStringFace">"Inertial<text:s/>Signals"</text:span><text:s/><text:span text:style-name="OrgSrcFontLockOperatorFace">/</text:span><text:s/><text:span text:style-name="OrgSrcFontLockStringFace">"total_acc_z_train.txt"</text:span>,</text:p>
      <text:p text:style-name="OrgSrcBlock"><text:s/><text:s/><text:s/><text:s/>sep<text:span text:style-name="OrgSrcFontLockOperatorFace">=</text:span>r<text:span text:style-name="OrgSrcFontLockStringFace">"\s+"</text:span>,</text:p>
      <text:p text:style-name="OrgSrcBlock"><text:s/><text:s/><text:s/><text:s/>header<text:span text:style-name="OrgSrcFontLockOperatorFace">=</text:span><text:span text:style-name="OrgSrcFontLockConstantFace">None</text:span></text:p>
      <text:p text:style-name="OrgSrcBlock">)</text:p>
      <text:p text:style-name="OrgSrcBlock"><text:span text:style-name="OrgSrcFontLockVariableNameFace">fig</text:span>,<text:s/><text:span text:style-name="OrgSrcFontLockVariableNameFace">axes</text:span><text:s/><text:span text:style-name="OrgSrcFontLockOperatorFace">=</text:span><text:s/>plt.subplots(3,<text:s/>2,<text:s/>figsize<text:span text:style-name="OrgSrcFontLockOperatorFace">=</text:span>(14,<text:s/>10))</text:p>
      <text:p text:style-name="OrgSrcBlock"><text:span text:style-name="OrgSrcFontLockVariableNameFace">axes</text:span><text:s/><text:span text:style-name="OrgSrcFontLockOperatorFace">=</text:span><text:s/>axes.ravel()</text:p>
      <text:p text:style-name="OrgSrcBlock"/>
      <text:p text:style-name="OrgSrcBlock"><text:span text:style-name="OrgSrcFontLockKeywordFace">for</text:span><text:s/>i,<text:s/>row<text:s/><text:span text:style-name="OrgSrcFontLockKeywordFace">in</text:span><text:s/>activity_labels.iterrows():</text:p>
      <text:p text:style-name="OrgSrcBlock"><text:s/><text:s/><text:s/><text:s/><text:span text:style-name="OrgSrcFontLockVariableNameFace">activity_id</text:span><text:s/><text:span text:style-name="OrgSrcFontLockOperatorFace">=</text:span><text:s/>row[<text:span text:style-name="OrgSrcFontLockStringFace">"id"</text:span>]</text:p>
      <text:p text:style-name="OrgSrcBlock"><text:s/><text:s/><text:s/><text:s/><text:span text:style-name="OrgSrcFontLockVariableNameFace">activity_name</text:span><text:s/><text:span text:style-name="OrgSrcFontLockOperatorFace">=</text:span><text:s/>row[<text:span text:style-name="OrgSrcFontLockStringFace">"activity"</text:span>]</text:p>
      <text:p text:style-name="OrgSrcBlock"/>
      <text:p text:style-name="OrgSrcBlock"><text:s/><text:s/><text:s/><text:s/><text:span text:style-name="OrgSrcFontLockVariableNameFace">idx</text:span><text:s/><text:span text:style-name="OrgSrcFontLockOperatorFace">=</text:span><text:s/>y_train[y_train[<text:span text:style-name="OrgSrcFontLockStringFace">"activity_id"</text:span>]<text:s/><text:span text:style-name="OrgSrcFontLockOperatorFace">==</text:span><text:s/>activity_id].index[0]</text:p>
      <text:p text:style-name="OrgSrcBlock"/>
      <text:p text:style-name="OrgSrcBlock"><text:s/><text:s/><text:s/><text:s/>axes[i].plot(acc_x.iloc[idx],<text:s/>label<text:span text:style-name="OrgSrcFontLockOperatorFace">=</text:span><text:span text:style-name="OrgSrcFontLockStringFace">"x"</text:span>)</text:p>
      <text:p text:style-name="OrgSrcBlock"><text:s/><text:s/><text:s/><text:s/>axes[i].plot(acc_y.iloc[idx],<text:s/>label<text:span text:style-name="OrgSrcFontLockOperatorFace">=</text:span><text:span text:style-name="OrgSrcFontLockStringFace">"y"</text:span>)</text:p>
      <text:p text:style-name="OrgSrcBlock"><text:s/><text:s/><text:s/><text:s/>axes[i].plot(acc_z.iloc[idx],<text:s/>label<text:span text:style-name="OrgSrcFontLockOperatorFace">=</text:span><text:span text:style-name="OrgSrcFontLockStringFace">"z"</text:span>)</text:p>
      <text:p text:style-name="OrgSrcBlock"/>
      <text:p text:style-name="OrgSrcBlock"><text:s/><text:s/><text:s/><text:s/>axes[i].set_title(activity_name)</text:p>
      <text:p text:style-name="OrgSrcBlock"><text:s/><text:s/><text:s/><text:s/>axes[i].set_xlabel(<text:span text:style-name="OrgSrcFontLockStringFace">"Sample<text:s/>number"</text:span>)</text:p>
      <text:p text:style-name="OrgSrcBlock"><text:s/><text:s/><text:s/><text:s/>axes[i].set_ylabel(<text:span text:style-name="OrgSrcFontLockStringFace">"Acceleration<text:s/>(g)"</text:span>)</text:p>
      <text:p text:style-name="OrgSrcBlock"><text:s/><text:s/><text:s/><text:s/>axes[i].legend()</text:p>
      <text:p text:style-name="OrgSrcBlock"/>
      <text:p text:style-name="OrgSrcBlock">plt.suptitle(<text:span text:style-name="OrgSrcFontLockStringFace">"raw"</text:span>,<text:s/>fontsize<text:span text:style-name="OrgSrcFontLockOperatorFace">=</text:span>16)</text:p>
      <text:p text:style-name="OrgSrcBlock">plt.tight_layout()</text:p>
      <text:p text:style-name="OrgSrcBlock">plt.savefig(<text:span text:style-name="OrgSrcFontLockStringFace">"raw_acc_window_per_activity.png"</text:span>,<text:s/>dpi<text:span text:style-name="OrgSrcFontLockOperatorFace">=</text:span>200)</text:p>
      <text:p text:style-name="OrgSrcBlockLastLine">plt.show()</text:p>
      <text:p text:style-name="Text_20_body">
<draw:frame draw:style-name="OrgDisplayImage" svg:width="17.00cm" svg:height="12.14cm" text:anchor-type="paragraph" draw:name="Frame1">

<draw:image xlink:href="Images/0001.png" xlink:type="simple" xlink:show="embed" xlink:actuate="onLoad"/>
</draw:frame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nstantFace" style:family="text">
      <style:text-properties fo:color="#0000b0"/>
    </style:style>
    <style:style style:name="OrgSrcFontLockStringFace" style:family="text">
      <style:text-properties fo:color="#3548cf"/>
    </style:style>
    <style:style style:name="OrgSrcFontLockOperatorFace" style:family="text">
      <style:text-properties fo:color="#000000"/>
    </style:style>
    <style:style style:name="OrgSrcFontLockVariableNameFace" style:family="text">
      <style:text-properties fo:color="#005e8b"/>
    </style:style>
    <style:style style:name="OrgSrcBlock" style:family="paragraph" style:parent-style-name="Preformatted_20_Text">
      <style:paragraph-properties fo:background-color="#fbf7f0" fo:padding="0.049cm" fo:border="0.51pt solid #000000" style:shadow="none">
        <style:background-image/>
      </style:paragraph-properties>
      <style:text-properties fo:color="#000000"/>
    </style:style>
    <style:style style:name="OrgSrcFontLockKeywordFace" style:family="text"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rypticwrath77</dc:creator>
    <meta:initial-creator>crypticwrath77</meta:initial-creator>
    <dc:date>2026-04-30T10:15:20</dc:date>
    <meta:creation-date>2026-04-30T10:15:20</meta:creation-date>
    <meta:generator>Emacs 30.2 (Org mode 9.8.1)</meta:generator>
    <meta:keyword/>
    <dc:subject/>
    <dc:title>Notebook for task1</dc:title>
  </office:meta>
</office:document-meta>
</file>